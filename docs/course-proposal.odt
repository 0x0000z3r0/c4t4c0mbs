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font-weight="bold" officeooo:rsid="0009f42f" officeooo:paragraph-rsid="0009f42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Mono" fo:font-weight="bold" officeooo:rsid="0009f42f" officeooo:paragraph-rsid="0009f42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Mono" fo:font-weight="normal" officeooo:rsid="0009f42f" officeooo:paragraph-rsid="0009f42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Mono" fo:font-weight="normal" officeooo:paragraph-rsid="0009f42f" style:font-weight-asian="normal" style:font-weight-complex="normal"/>
    </style:style>
    <style:style style:name="P6" style:family="paragraph" style:parent-style-name="Standard">
      <style:text-properties style:font-name="FreeMono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reeMono" fo:font-size="26pt" fo:font-weight="bold" officeooo:rsid="0009f42f" officeooo:paragraph-rsid="0009f42f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1cda9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Mono" fo:font-size="12pt" fo:font-weight="normal" officeooo:paragraph-rsid="001cda93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FreeMono"/>
    </style:style>
    <style:style style:name="P12" style:family="paragraph" style:parent-style-name="Standard">
      <style:paragraph-properties fo:text-align="start" style:justify-single-word="false"/>
      <style:text-properties style:font-name="FreeMono" fo:font-style="italic" officeooo:paragraph-rsid="000f46ce"/>
    </style:style>
    <style:style style:name="P13" style:family="paragraph" style:parent-style-name="Standard">
      <style:paragraph-properties fo:text-align="center" style:justify-single-word="false"/>
      <style:text-properties style:font-name="FreeMono" fo:font-size="16pt" fo:font-weight="bold" officeooo:rsid="000d9954" officeooo:paragraph-rsid="000d995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Mono" fo:font-size="14pt" fo:font-style="normal" fo:font-weight="bold" officeooo:rsid="000f46ce" officeooo:paragraph-rsid="000f46ce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style:font-name="FreeMono" officeooo:paragraph-rsid="002cb5f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paragraph-rsid="0009f42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font-name="FreeMono" fo:font-size="14pt" fo:font-style="normal" fo:font-weight="bold" officeooo:rsid="000d9954" officeooo:paragraph-rsid="000d995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style:font-name="FreeMono" fo:font-size="14pt" fo:font-style="normal" fo:font-weight="bold" officeooo:paragraph-rsid="001cda93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style:font-name="FreeMono" fo:font-size="14pt" fo:font-style="normal" fo:font-weight="bold" officeooo:paragraph-rsid="001edde1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style:font-name="FreeMono" fo:font-size="14pt" fo:font-style="normal" fo:font-weight="bold" officeooo:paragraph-rsid="00226625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style:font-name="FreeMono" fo:font-size="14pt" fo:font-style="normal" fo:font-weight="bold" officeooo:paragraph-rsid="0024acfb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style:font-name="FreeMono" fo:font-size="14pt" fo:font-style="normal" fo:font-weight="bold" officeooo:paragraph-rsid="002e5b43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style:font-name="FreeMono" fo:font-size="14pt" fo:font-style="normal" fo:font-weight="bold" officeooo:paragraph-rsid="00301c62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style:font-name="FreeMono" fo:font-size="12pt" fo:font-style="normal" fo:font-weight="normal" officeooo:rsid="000f46ce" officeooo:paragraph-rsid="000f46ce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style:line-height-at-least="0.2083in"/>
      <style:text-properties fo:font-variant="normal" fo:text-transform="none" style:font-name="FreeMono" fo:font-size="12pt" fo:font-style="normal" fo:font-weight="normal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FreeMono" fo:font-weight="normal" officeooo:rsid="0009f42f" officeooo:paragraph-rsid="0009f42f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c9211e" loext:opacity="100%" style:font-name="FreeMono" fo:font-size="16pt" fo:font-weight="bold" officeooo:rsid="0009f42f" officeooo:paragraph-rsid="0009f42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FreeMono" fo:font-size="12pt" fo:font-style="italic" fo:font-weight="normal" officeooo:rsid="000d9954" officeooo:paragraph-rsid="000f46ce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reeMono" fo:font-size="12pt" fo:font-style="italic" fo:font-weight="normal" officeooo:rsid="000f46ce" officeooo:paragraph-rsid="000f46ce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0d995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0d995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1cda9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22662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24acf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2e5b4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FreeMono" fo:font-size="12pt" fo:font-weight="normal" officeooo:rsid="000d9954" officeooo:paragraph-rsid="00301c6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FreeMono" fo:font-size="12pt" fo:font-weight="normal" officeooo:paragraph-rsid="001cda9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FreeMono" fo:font-size="12pt" fo:font-weight="bold" officeooo:rsid="000d9954" officeooo:paragraph-rsid="0022662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style:font-name="FreeMono" fo:font-size="16pt" fo:font-style="normal" fo:font-weight="bold" officeooo:rsid="000d9954" officeooo:paragraph-rsid="00301c62" style:font-size-asian="16pt" style:font-weight-asian="bold" style:font-size-complex="16pt" style:font-weight-complex="bold"/>
    </style:style>
    <style:style style:name="T1" style:family="text">
      <style:text-properties officeooo:rsid="0009f42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13f10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loext:opacity="100%" officeooo:rsid="00194ec4"/>
    </style:style>
    <style:style style:name="T7" style:family="text">
      <style:text-properties fo:color="#c9211e" loext:opacity="100%" officeooo:rsid="00194ec4" style:font-size-asian="14pt" style:font-weight-asian="bold" style:font-size-complex="14pt" style:font-weight-complex="bold"/>
    </style:style>
    <style:style style:name="T8" style:family="text">
      <style:text-properties fo:color="#c9211e" loext:opacity="100%" officeooo:rsid="001cda93" style:font-size-asian="14pt" style:font-weight-asian="bold" style:font-size-complex="14pt" style:font-weight-complex="bold"/>
    </style:style>
    <style:style style:name="T9" style:family="text">
      <style:text-properties fo:color="#c9211e" loext:opacity="100%" officeooo:rsid="001edde1" style:font-size-asian="14pt" style:font-weight-asian="bold" style:font-size-complex="14pt" style:font-weight-complex="bold"/>
    </style:style>
    <style:style style:name="T10" style:family="text">
      <style:text-properties fo:color="#c9211e" loext:opacity="100%" officeooo:rsid="00226625" style:font-size-asian="14pt" style:font-weight-asian="bold" style:font-size-complex="14pt" style:font-weight-complex="bold"/>
    </style:style>
    <style:style style:name="T11" style:family="text">
      <style:text-properties fo:color="#c9211e" loext:opacity="100%" officeooo:rsid="0024acfb" style:font-size-asian="14pt" style:font-weight-asian="bold" style:font-size-complex="14pt" style:font-weight-complex="bold"/>
    </style:style>
    <style:style style:name="T12" style:family="text">
      <style:text-properties fo:color="#c9211e" loext:opacity="100%" officeooo:rsid="002e5b43" style:font-size-asian="14pt" style:font-weight-asian="bold" style:font-size-complex="14pt" style:font-weight-complex="bold"/>
    </style:style>
    <style:style style:name="T13" style:family="text">
      <style:text-properties fo:color="#c9211e" loext:opacity="100%" officeooo:rsid="00301c62" style:font-size-asian="14pt" style:font-weight-asian="bold" style:font-size-complex="14pt" style:font-weight-complex="bold"/>
    </style:style>
    <style:style style:name="T14" style:family="text">
      <style:text-properties fo:font-size="12pt" fo:font-weight="normal" officeooo:rsid="000d9954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weight="normal" officeooo:rsid="000f46ce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18" style:family="text">
      <style:text-properties fo:font-variant="normal" fo:text-transform="none" fo:font-size="12pt" fo:font-style="normal" fo:font-weight="normal" officeooo:rsid="002cb5fd" style:font-size-asian="12pt" style:font-size-complex="12pt"/>
    </style:style>
    <style:style style:name="T19" style:family="text">
      <style:text-properties fo:font-variant="normal" fo:text-transform="none" officeooo:rsid="0016c12f"/>
    </style:style>
    <style:style style:name="T20" style:family="text">
      <style:text-properties fo:font-variant="normal" fo:text-transform="none" fo:color="#c9211e" loext:opacity="100%" officeooo:rsid="0016c12f"/>
    </style:style>
    <style:style style:name="T21" style:family="text">
      <style:text-properties officeooo:rsid="000d9954" style:font-weight-asian="normal" style:font-weight-complex="normal"/>
    </style:style>
    <style:style style:name="T22" style:family="text">
      <style:text-properties officeooo:rsid="00175abf" style:font-weight-asian="normal" style:font-weight-complex="normal"/>
    </style:style>
    <style:style style:name="T23" style:family="text">
      <style:text-properties style:font-size-asian="14pt" style:font-weight-asian="bold" style:font-size-complex="14pt" style:font-weight-complex="bold"/>
    </style:style>
    <style:style style:name="T24" style:family="text">
      <style:text-properties officeooo:rsid="000d9954" style:font-size-asian="14pt" style:font-weight-asian="bold" style:font-size-complex="14pt" style:font-weight-complex="bold"/>
    </style:style>
    <style:style style:name="T25" style:family="text">
      <style:text-properties officeooo:rsid="0025addf" style:font-size-asian="14pt" style:font-weight-asian="bold" style:font-size-complex="14pt" style:font-weight-complex="bold"/>
    </style:style>
    <style:style style:name="T26" style:family="text">
      <style:text-properties officeooo:rsid="00269722" style:font-size-asian="14pt" style:font-weight-asian="bold" style:font-size-complex="14pt" style:font-weight-complex="bold"/>
    </style:style>
    <style:style style:name="T27" style:family="text">
      <style:text-properties officeooo:rsid="002a30a4" style:font-size-asian="14pt" style:font-weight-asian="bold" style:font-size-complex="14pt" style:font-weight-complex="bold"/>
    </style:style>
    <style:style style:name="T28" style:family="text">
      <style:text-properties officeooo:rsid="002a684f" style:font-size-asian="14pt" style:font-weight-asian="bold" style:font-size-complex="14pt" style:font-weight-complex="bold"/>
    </style:style>
    <style:style style:name="T29" style:family="text">
      <style:text-properties officeooo:rsid="002b2ac0" style:font-size-asian="14pt" style:font-weight-asian="bold" style:font-size-complex="14pt" style:font-weight-complex="bold"/>
    </style:style>
    <style:style style:name="T30" style:family="text">
      <style:text-properties officeooo:rsid="002e0dd9" style:font-size-asian="14pt" style:font-weight-asian="bold" style:font-size-complex="14pt" style:font-weight-complex="bold"/>
    </style:style>
    <style:style style:name="T31" style:family="text">
      <style:text-properties officeooo:rsid="003180a2" style:font-size-asian="14pt" style:font-weight-asian="bold" style:font-size-complex="14pt" style:font-weight-complex="bold"/>
    </style:style>
    <style:style style:name="T32" style:family="text">
      <style:text-properties officeooo:rsid="002a684f"/>
    </style:style>
    <style:style style:name="T33" style:family="text">
      <style:text-properties officeooo:rsid="00346ced"/>
    </style:style>
    <style:style style:name="T34" style:family="text">
      <style:text-properties officeooo:rsid="003500c0"/>
    </style:style>
    <style:style style:name="T35" style:family="text">
      <style:text-properties officeooo:rsid="0038fe80"/>
    </style:style>
    <style:style style:name="T36" style:family="text">
      <style:text-properties officeooo:rsid="003b5b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urse Proposal</text:p>
      <text:p text:style-name="P1"/>
      <text:p text:style-name="P3"><text:span text:style-name="T4">Author:</text:span> Hrant Tadevosyan, <text:span text:style-name="T36">Levon Martirosyan</text:span></text:p>
      <text:p text:style-name="P2">Email: <text:span text:style-name="T5">hrant.tadevosyan@protonmail.com</text:span></text:p>
      <text:p text:style-name="P26"/>
      <text:p text:style-name="P27"/>
      <text:p text:style-name="P27"/>
      <text:p text:style-name="P27"/>
      <text:p text:style-name="P27">The Hardware Underground:</text:p>
      <text:p text:style-name="P16"><text:span text:style-name="T2">Firmware </text:span><text:span text:style-name="T3">&amp;</text:span><text:span text:style-name="T2"> Hardware Security Engineering</text:span></text:p>
      <text:p text:style-name="P5"/>
      <text:p text:style-name="P5"/>
      <text:p text:style-name="P5"><text:span text:style-name="T1">Modern critical infrastructure, automotive systems, industrial control </text:span>systems, IoT devices, routers, medical equipment, and consumer electronics all rely on embedded systems and firmware.</text:p>
      <text:p text:style-name="P4"/>
      <text:p text:style-name="P4">This course provides students with the fundamental and advanced knowledge required to analyze, assess, secure, and understand embedded devices at both software and hardware levels.</text:p>
      <text:p text:style-name="P4"/>
      <text:p text:style-name="P4">Students will acquire practical skills in:</text:p>
      <text:p text:style-name="P4">• Reverse Engineering</text:p>
      <text:p text:style-name="P4">• Vulnerability Analysis</text:p>
      <text:p text:style-name="P4">• Exploit Development</text:p>
      <text:p text:style-name="P4">• Firmware Security</text:p>
      <text:p text:style-name="P4">• Hardware Hacking</text:p>
      <text:p text:style-name="P4">• Secure Embedded Design</text:p>
      <text:p text:style-name="P4">• Hardware Root of Trust</text:p>
      <text:p text:style-name="P4">• Wireless Protocol Security</text:p>
      <text:p text:style-name="P4"/>
      <text:p text:style-name="P4">The course combines theoretical instruction with hands-on laboratory</text:p>
      <text:p text:style-name="P4">exercises using real hardware and firmware imag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Modules*</text:p>
      <text:p text:style-name="P28"/>
      <text:p text:style-name="P24"><text:span text:style-name="T21">All course materials, including presentations, laboratory guides, and examples, will be published through a dedicated Git </text:span><text:span text:style-name="T22">server</text:span><text:span text:style-name="T21"> repository. The course will primarily use open-source tools and Linux-based virtual machines, allowing students to complete the initial modules using only standard computing equipment, with specialized hardware introduced in later hands-on laboratories.</text:span></text:p>
      <text:p text:style-name="P25">To support collaboration and practical learning, a dedicated discussion platform and a customized CTF infrastructure are planned. High-performing students will be recognized through advanced challenge tracks, with custom-designed hardware badges awarded as a distinction for exceptional achievement.</text:p>
      <text:p text:style-name="P12"><text:span text:style-name="T14">*N</text:span><text:span text:style-name="T15">OTE: all written topics are subject to change. The overview is there to only identify the initial project goal</text:span></text:p>
      <text:p text:style-name="P29"/>
      <text:p text:style-name="P29"/>
      <text:p text:style-name="P29"/>
      <text:p text:style-name="P14"><text:span text:style-name="T19">Module </text:span><text:span text:style-name="T20">0x00</text:span><text:span text:style-name="T19"> - </text:span><text:span text:style-name="T16">Computer Architecture Foundations</text:span></text:p>
      <text:p text:style-name="P30">Topics:</text:p>
      <text:p text:style-name="P11">• Binary and hexadecimal systems</text:p>
      <text:p text:style-name="P11">• CPU architecture</text:p>
      <text:p text:style-name="P11">• Memory organization</text:p>
      <text:p text:style-name="P11">• Registers</text:p>
      <text:p text:style-name="P11">• Stack and heap</text:p>
      <text:p text:style-name="P11">• Calling conventions</text:p>
      <text:p text:style-name="P11">• Virtual memory</text:p>
      <text:p text:style-name="P11">• Interrupts</text:p>
      <text:p text:style-name="P11">• Cache hierarchy</text:p>
      <text:p text:style-name="P11"/>
      <text:p text:style-name="P11">Laboratory:</text:p>
      <text:p text:style-name="P11">• Memory inspection</text:p>
      <text:p text:style-name="P11">• Process analysis</text:p>
      <text:p text:style-name="P11">• Stack visualization</text:p>
      <text:p text:style-name="P11"/>
      <text:p text:style-name="P17">Module <text:span text:style-name="T6">0x01</text:span> - Secure Systems Programming</text:p>
      <text:p text:style-name="P31">Topics:</text:p>
      <text:p text:style-name="P9">• Pointers</text:p>
      <text:p text:style-name="P9">• Memory management</text:p>
      <text:p text:style-name="P9">• Structures</text:p>
      <text:p text:style-name="P9">• Bit operations</text:p>
      <text:p text:style-name="P9">• Memory corruption fundamentals</text:p>
      <text:p text:style-name="P9">• Unsafe programming patterns</text:p>
      <text:p text:style-name="P9"/>
      <text:p text:style-name="P9">Laboratory:</text:p>
      <text:p text:style-name="P9">• Pointer analysis</text:p>
      <text:p text:style-name="P9">• Vulnerable application studies</text:p>
      <text:p text:style-name="P9"/>
      <text:p text:style-name="P9"/>
      <text:p text:style-name="P9"/>
      <text:p text:style-name="P9"/>
      <text:p text:style-name="P9"/>
      <text:p text:style-name="P18"><text:soft-page-break/><text:span text:style-name="T24">Module </text:span><text:span text:style-name="T7">0x0</text:span><text:span text:style-name="T8">2</text:span><text:span text:style-name="T24"> - </text:span><text:span text:style-name="T23">Assembly Language Fundamentals</text:span></text:p>
      <text:p text:style-name="P10">Topics:</text:p>
      <text:p text:style-name="P11">• x86-64 Assembly</text:p>
      <text:p text:style-name="P11">• ARM Assembly</text:p>
      <text:p text:style-name="P11">• Function calls</text:p>
      <text:p text:style-name="P11">• System calls</text:p>
      <text:p text:style-name="P11">• Control flow</text:p>
      <text:p text:style-name="P11"/>
      <text:p text:style-name="P11">Laboratory:</text:p>
      <text:p text:style-name="P11">• Debugging exercises</text:p>
      <text:p text:style-name="P11">• Binary tracing</text:p>
      <text:p text:style-name="P10"/>
      <text:p text:style-name="P19"><text:span text:style-name="T24">Module </text:span><text:span text:style-name="T7">0x0</text:span><text:span text:style-name="T9">3</text:span><text:span text:style-name="T24"> - Reverse Engineering</text:span></text:p>
      <text:p text:style-name="P8">Topics:</text:p>
      <text:p text:style-name="P11">• Static Analysis</text:p>
      <text:p text:style-name="P11">• Dynamic Analysis</text:p>
      <text:p text:style-name="P11">• Control Flow Analysis</text:p>
      <text:p text:style-name="P11">• Protocol Reverse Engineering</text:p>
      <text:p text:style-name="P11">• Malware Analysis Fundamentals</text:p>
      <text:p text:style-name="P11"/>
      <text:p text:style-name="P11">Laboratory:</text:p>
      <text:p text:style-name="P11">• Reverse engineering of software and firmware samples</text:p>
      <text:p text:style-name="P8"/>
      <text:p text:style-name="P20"><text:span text:style-name="T24">Module </text:span><text:span text:style-name="T7">0x0</text:span><text:span text:style-name="T10">4</text:span><text:span text:style-name="T24"> - Vulnerability Research</text:span></text:p>
      <text:p text:style-name="P33">Topics:</text:p>
      <text:p text:style-name="P6">• Buffer Overflows</text:p>
      <text:p text:style-name="P6">• Integer Overflows</text:p>
      <text:p text:style-name="P6">• Format String Bugs</text:p>
      <text:p text:style-name="P6">• Use-After-Free</text:p>
      <text:p text:style-name="P6">• Race Conditions</text:p>
      <text:p text:style-name="P6"/>
      <text:p text:style-name="P6">Laboratory:</text:p>
      <text:p text:style-name="P6">• Vulnerability discovery exercises</text:p>
      <text:p text:style-name="P38"/>
      <text:p text:style-name="P21"><text:span text:style-name="T24">Module </text:span><text:span text:style-name="T7">0x0</text:span><text:span text:style-name="T11">5</text:span><text:span text:style-name="T24"> – </text:span><text:span text:style-name="T25">Exploit Development</text:span></text:p>
      <text:p text:style-name="P34">Topics:</text:p>
      <text:p text:style-name="P11">• Stack Exploitation</text:p>
      <text:p text:style-name="P11">• Return-Oriented Programming</text:p>
      <text:p text:style-name="P11">• Mitigation Bypasses</text:p>
      <text:p text:style-name="P11">• Embedded Exploitation</text:p>
      <text:p text:style-name="P11"/>
      <text:p text:style-name="P11">Laboratory:</text:p>
      <text:p text:style-name="P11">• Proof-of-concept exploit construction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<text:soft-page-break/><text:span text:style-name="T24">Module </text:span><text:span text:style-name="T7">0x0</text:span><text:span text:style-name="T11">6</text:span><text:span text:style-name="T24"> – </text:span><text:span text:style-name="T26">Firmware Security</text:span></text:p>
      <text:p text:style-name="P34">Topics:</text:p>
      <text:p text:style-name="P11">• Firmware Architecture</text:p>
      <text:p text:style-name="P11">• Bootloaders</text:p>
      <text:p text:style-name="P11">• Linux Kernel</text:p>
      <text:p text:style-name="P11">• Device Tree</text:p>
      <text:p text:style-name="P11">• Filesystems</text:p>
      <text:p text:style-name="P11"/>
      <text:p text:style-name="P11">Laboratory:</text:p>
      <text:p text:style-name="P11">• Firmware extraction and analysis</text:p>
      <text:p text:style-name="P34"/>
      <text:p text:style-name="P34"/>
      <text:p text:style-name="P21"><text:span text:style-name="T24">Module </text:span><text:span text:style-name="T7">0x0</text:span><text:span text:style-name="T11">7</text:span><text:span text:style-name="T24"> – </text:span><text:span text:style-name="T27">Electronics</text:span><text:span text:style-name="T29"> Fundamentals</text:span></text:p>
      <text:p text:style-name="P34">Topics:</text:p>
      <text:p text:style-name="P15">• <text:span text:style-name="T17">Voltage/Current/</text:span><text:span text:style-name="T18">Resistance</text:span><text:span text:style-name="T17"> </text:span></text:p>
      <text:p text:style-name="P15"><text:span text:style-name="T17">• </text:span><text:span text:style-name="T18">Basic Components</text:span></text:p>
      <text:p text:style-name="P15"><text:span text:style-name="T17">• </text:span><text:span text:style-name="T18">Digital Electronics</text:span></text:p>
      <text:p text:style-name="P15"><text:span text:style-name="T17">• </text:span><text:span text:style-name="T18">Soldering and Rework</text:span></text:p>
      <text:p text:style-name="P11"/>
      <text:p text:style-name="P11">Laboratory:</text:p>
      <text:p text:style-name="P11">• Embedded Linux security review</text:p>
      <text:p text:style-name="P34"/>
      <text:p text:style-name="P21"><text:span text:style-name="T24">Module </text:span><text:span text:style-name="T7">0x0</text:span><text:span text:style-name="T11">8</text:span><text:span text:style-name="T24"> – </text:span><text:span text:style-name="T28">Hardware Interfaces</text:span></text:p>
      <text:p text:style-name="P34">Topics:</text:p>
      <text:p text:style-name="P11">• UART</text:p>
      <text:p text:style-name="P11">• SPI</text:p>
      <text:p text:style-name="P11">• I2C</text:p>
      <text:p text:style-name="P11">• JTAG/<text:span text:style-name="T32">SWD</text:span></text:p>
      <text:p text:style-name="P11"/>
      <text:p text:style-name="P11">Laboratory:</text:p>
      <text:p text:style-name="P11">• Hardware identification</text:p>
      <text:p text:style-name="P11">• Flash extraction</text:p>
      <text:p text:style-name="P11">• Debug interface analysis</text:p>
      <text:p text:style-name="P34"/>
      <text:p text:style-name="P34"/>
      <text:p text:style-name="P21"><text:span text:style-name="T24">Module </text:span><text:span text:style-name="T7">0x0</text:span><text:span text:style-name="T11">9</text:span><text:span text:style-name="T24"> – </text:span><text:span text:style-name="T30">Secure Boot &amp; Hardware Trust</text:span></text:p>
      <text:p text:style-name="P34">Topics:</text:p>
      <text:p text:style-name="P11">• Secure Boot</text:p>
      <text:p text:style-name="P11">• TPM</text:p>
      <text:p text:style-name="P11">• Hardware Root of Trust</text:p>
      <text:p text:style-name="P11">• TrustZone</text:p>
      <text:p text:style-name="P11">• Secure Elements</text:p>
      <text:p text:style-name="P11"/>
      <text:p text:style-name="P11">Laboratory:</text:p>
      <text:p text:style-name="P11">• Secure boot assessmen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<text:span text:style-name="T24">Module </text:span><text:span text:style-name="T7">0x0</text:span><text:span text:style-name="T12">A</text:span><text:span text:style-name="T24"> – </text:span><text:span text:style-name="T31">Hardware Attacks</text:span></text:p>
      <text:p text:style-name="P35">Topics:</text:p>
      <text:p text:style-name="P11">• Fault Injection</text:p>
      <text:p text:style-name="P11">• Voltage Glitching</text:p>
      <text:p text:style-name="P11">• Clock Glitching</text:p>
      <text:p text:style-name="P11">• Side-Channel Analysis</text:p>
      <text:p text:style-name="P11">• Power Analysis</text:p>
      <text:p text:style-name="P11"/>
      <text:p text:style-name="P11">Laboratory:</text:p>
      <text:p text:style-name="P11">• Controlled fault injection demonstrations</text:p>
      <text:p text:style-name="P35"/>
      <text:p text:style-name="P23"><text:span text:style-name="T24">Module </text:span><text:span text:style-name="T7">0x0</text:span><text:span text:style-name="T13">B</text:span><text:span text:style-name="T24"> – </text:span><text:span text:style-name="T31">Wireless Security</text:span></text:p>
      <text:p text:style-name="P36">Topics:</text:p>
      <text:p text:style-name="P11">• Bluetooth Low Energy</text:p>
      <text:p text:style-name="P11">• Zigbee</text:p>
      <text:p text:style-name="P11">• LoRa</text:p>
      <text:p text:style-name="P11">• RFID</text:p>
      <text:p text:style-name="P11">• NFC</text:p>
      <text:p text:style-name="P11"/>
      <text:p text:style-name="P11">Laboratory:</text:p>
      <text:p text:style-name="P11">• Protocol analysis</text:p>
      <text:p text:style-name="P11">• Traffic inspection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><text:soft-page-break/>Laboratory Equipment Requirements</text:p>
      <text:p text:style-name="P36"/>
      <text:p text:style-name="P36"/>
      <text:p text:style-name="P36">Required Hardware:</text:p>
      <text:p text:style-name="P11">• Raspberry Pi 5</text:p>
      <text:p text:style-name="P11">• STM32 Development Boards</text:p>
      <text:p text:style-name="P11">• BeagleBone Black</text:p>
      <text:p text:style-name="P11">• Logic Analyzer</text:p>
      <text:p text:style-name="P11">• Oscilloscope</text:p>
      <text:p text:style-name="P11">• UART Adapters</text:p>
      <text:p text:style-name="P11">• JTAG/SWD Debuggers</text:p>
      <text:p text:style-name="P11">• RTL-SDR</text:p>
      <text:p text:style-name="P11">• ESP32 Development Boards</text:p>
      <text:p text:style-name="P11">• Assorted IoT Devices</text:p>
      <text:p text:style-name="P11"/>
      <text:p text:style-name="P11">Software:</text:p>
      <text:p text:style-name="P11">• Linux</text:p>
      <text:p text:style-name="P11">• <text:span text:style-name="T33">Radare2</text:span></text:p>
      <text:p text:style-name="P11">• Binwalk/<text:span text:style-name="T35">EMBA</text:span></text:p>
      <text:p text:style-name="P11">• QEMU</text:p>
      <text:p text:style-name="P11">• OpenOCD/<text:span text:style-name="T33">GDB</text:span></text:p>
      <text:p text:style-name="P11">• Wireshark</text:p>
      <text:p text:style-name="P11">• <text:span text:style-name="T33">SDR++/</text:span><text:span text:style-name="T34">URH</text:span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08:24:25.453663523</meta:creation-date>
    <dc:date>2026-07-02T10:03:45.938383714</dc:date>
    <meta:editing-duration>PT1H25M54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6" meta:paragraph-count="159" meta:word-count="609" meta:character-count="4210" meta:non-whitespace-character-count="3752"/>
  </office:meta>
</office:document-meta>
</file>